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E0000035A493ABA15.png" manifest:media-type="image/png"/>
  <manifest:file-entry manifest:full-path="Pictures/100000000000078000000438A2C89372.png" manifest:media-type="image/png"/>
  <manifest:file-entry manifest:full-path="Pictures/10000001000004DD000003F70DF9E3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16pt" officeooo:rsid="0014df24" officeooo:paragraph-rsid="0014df2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ntarell Extra Bold" fo:font-size="12pt" officeooo:rsid="0014df24" officeooo:paragraph-rsid="0014df24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officeooo:rsid="0014df24" officeooo:paragraph-rsid="0014df24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ntarell Extra Bold" fo:font-size="12pt" officeooo:rsid="0016843d" officeooo:paragraph-rsid="001684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6843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96a6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96a6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7794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ntarell Extra Bold" fo:font-size="14pt" officeooo:rsid="001e8e5a" officeooo:paragraph-rsid="001e8e5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4pt" officeooo:rsid="001e8e5a" officeooo:paragraph-rsid="001e8e5a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ntarell Extra Bold" fo:font-size="14pt" officeooo:rsid="0020c9e9" officeooo:paragraph-rsid="0020c9e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4pt" officeooo:rsid="0020c9e9" officeooo:paragraph-rsid="0020c9e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4pt" officeooo:rsid="0022e84b" officeooo:paragraph-rsid="0022e84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antarell Extra Bold" fo:font-size="14pt" officeooo:rsid="00243aa3" officeooo:paragraph-rsid="00243aa3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43aa3" officeooo:paragraph-rsid="00243aa3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4pt" officeooo:rsid="00243aa3" officeooo:paragraph-rsid="00243aa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5ca3f" officeooo:paragraph-rsid="0025ca3f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5ca3f" officeooo:paragraph-rsid="0025ca3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5ca3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64f72" officeooo:paragraph-rsid="00264f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64f7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b1c53" officeooo:paragraph-rsid="002b1c5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b1c53" officeooo:paragraph-rsid="002b1c53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color="#000000" loext:opacity="100%" style:font-name="Cantarell" fo:font-size="14pt" fo:font-weight="normal" officeooo:rsid="002b1c53" officeooo:paragraph-rsid="002b1c5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2pt" officeooo:rsid="0022e84b" officeooo:paragraph-rsid="0022e84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2pt" officeooo:rsid="002b1c53" officeooo:paragraph-rsid="002b1c53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antarell Extra Bold" fo:font-size="14pt" officeooo:rsid="00388a0f" officeooo:paragraph-rsid="00388a0f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2pt" officeooo:rsid="00388a0f" officeooo:paragraph-rsid="00388a0f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Cantarell Extra Bold" fo:font-size="14pt" officeooo:rsid="003966db" officeooo:paragraph-rsid="003966db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Cantarell Extra Bold" fo:font-size="14pt" officeooo:rsid="002b1c53" officeooo:paragraph-rsid="002b1c53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officeooo:rsid="002b1c53" officeooo:paragraph-rsid="002b1c53" style:font-size-asian="12.25pt" style:font-size-complex="14pt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Cantarell" fo:font-size="14pt" officeooo:rsid="002b1c53" officeooo:paragraph-rsid="002b1c53" style:font-size-asian="12.25pt" style:font-size-complex="14pt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Cantarell" fo:font-size="14pt" officeooo:rsid="003804da" officeooo:paragraph-rsid="003804da" style:font-size-asian="12.25pt" style:font-size-complex="14pt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Cantarell" fo:font-size="14pt" officeooo:rsid="002b7cab" officeooo:paragraph-rsid="002b7cab" style:font-size-asian="12.25pt" style:font-size-complex="14pt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Cantarell" fo:font-size="14pt" officeooo:rsid="002e5db4" officeooo:paragraph-rsid="002e5db4" style:font-size-asian="12.25pt" style:font-size-complex="14pt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Cantarell" fo:font-size="14pt" officeooo:rsid="002ecf5f" officeooo:paragraph-rsid="002ecf5f" style:font-size-asian="12.25pt" style:font-size-complex="14pt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Cantarell" fo:font-size="14pt" officeooo:rsid="002ed7eb" officeooo:paragraph-rsid="002ed7eb" style:font-size-asian="12.25pt" style:font-size-complex="14pt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Cantarell" fo:font-size="14pt" officeooo:rsid="0030306f" officeooo:paragraph-rsid="0030306f" style:font-size-asian="12.25pt" style:font-size-complex="14pt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Cantarell" fo:font-size="14pt" officeooo:rsid="00318ab9" officeooo:paragraph-rsid="00318ab9" style:font-size-asian="12.25pt" style:font-size-complex="14pt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Cantarell" fo:font-size="14pt" officeooo:rsid="00344bfe" officeooo:paragraph-rsid="00344bfe" style:font-size-asian="12.25pt" style:font-size-complex="14pt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Cantarell" fo:font-size="14pt" officeooo:rsid="003f4f4a" officeooo:paragraph-rsid="003f4f4a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Cantarell" fo:font-size="14pt" officeooo:rsid="002ed7eb" officeooo:paragraph-rsid="002ed7eb" style:font-size-asian="12.25pt" style:font-size-complex="14pt"/>
    </style:style>
    <style:style style:name="T1" style:family="text">
      <style:text-properties style:font-name="Cantarell" officeooo:rsid="00177943"/>
    </style:style>
    <style:style style:name="T2" style:family="text">
      <style:text-properties officeooo:rsid="00196a61"/>
    </style:style>
    <style:style style:name="T3" style:family="text">
      <style:text-properties style:font-name="Cantarell"/>
    </style:style>
    <style:style style:name="T4" style:family="text">
      <style:text-properties officeooo:rsid="0022e84b"/>
    </style:style>
    <style:style style:name="T5" style:family="text">
      <style:text-properties officeooo:rsid="003c407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4f72" style:font-weight-asian="normal" style:font-weight-complex="normal"/>
    </style:style>
    <style:style style:name="T8" style:family="text">
      <style:text-properties officeooo:rsid="0028774b"/>
    </style:style>
    <style:style style:name="T9" style:family="text">
      <style:text-properties officeooo:rsid="002d11ef"/>
    </style:style>
    <style:style style:name="T10" style:family="text">
      <style:text-properties officeooo:rsid="002dabaa"/>
    </style:style>
    <style:style style:name="T11" style:family="text">
      <style:text-properties officeooo:rsid="0032a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FACULDADE SÃO PAULO TECH SCHOOL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Ciência da Computação</text:p>
      <text:p text:style-name="P4"/>
      <text:p text:style-name="P4">Enzo Basseto Martelozzo</text:p>
      <text:p text:style-name="P4"/>
      <text:p text:style-name="P4"/>
      <text:p text:style-name="P4"/>
      <text:p text:style-name="P4"/>
      <text:p text:style-name="P4"/>
      <text:p text:style-name="P3">PROJETO INDIVIDUAL:</text:p>
      <text:p text:style-name="P3"/>
      <text:p text:style-name="P3"/>
      <text:p text:style-name="P5"/>
      <text:p text:style-name="P5">A importância da Arte audiovisual (Ilustrações e Animaçã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CONTEXTO:</text:p>
      <text:p text:style-name="P6"/>
      <text:p text:style-name="P7">- <text:span text:style-name="T1">A arte audiovisual, como ilustrações, esteve presente na história da humanidade desde a idade da Pedra, e vem trazendo papel notável como forma de documentação histórica que sempre nos ajudou a entender como era cada período, identificar pessoas importantes e muito mais.</text:span></text:p>
      <text:p text:style-name="P8"/>
      <text:p text:style-name="P8"><text:span text:style-name="T2">T</text:span>endo isto em mente, como pessoalmente, desde pequeno, gostei de desenhar e demonstr<text:span text:style-name="T2">ei</text:span> interesse a este nicho, foi decidido utilizar este tópico para expressar o meu gosto e trazer um guia contendo tanto fundamentos da arte, importância histórica, técnicas em ilustrações e animações e mencionar nomes de artistas inspiradores a mim de acordo com cada área de atuamento.</text:p>
      <text:p text:style-name="P8"/>
      <text:p text:style-name="P9"/>
      <text:p text:style-name="P10">OBJETIVO:</text:p>
      <text:p text:style-name="P10"/>
      <text:p text:style-name="P10">-<text:span text:style-name="T3">Criar um site com HTML e CSS, que contém tópicos da contextualização da arte, trazer material acadêmico sobre técnicas relacionadas a tais tipos de ilustrações, referenciar artistas de grande influência e então disponibilizar um quiz em relação a todo o material disponibilizado e fornecer uma tela com indicadores sobre a média dos resultados que foram inseridos pelos usuários usando Chart.JS, com dados consultados do Banco de Dados a partir da API Node.JS.</text:span></text:p>
      <text:p text:style-name="P11"/>
      <text:p text:style-name="P11">Além de incluir ferramenta de cadastro e login dos usuários, ao usar a API para consultar o Banco de dados com os dados de login dos usuários.</text:p>
      <text:p text:style-name="P11"/>
      <text:p text:style-name="P12">JUSTIFICATIVA:</text:p>
      <text:p text:style-name="P12"/>
      <text:p text:style-name="P12">- <text:span text:style-name="T3">A justificativa para a escolha deste tema vem por questões de gostos pessoais,</text:span></text:p>
      <text:p text:style-name="P13">o que me faz gostar da arte principalmente no meio de entreterimento audiovisual vem <text:span text:style-name="T4">do impacto que me trouxe durante minha vida, a partir de séries animadas que me definiram quando pequeno, ou de perceber como algo que antes parecia tão trivial de se existir, ser algo de extrema importância Histórica e que ajudava a nos definir como humanos, sendo uma das formas mais puras de se expressar a criatividade, de tanto conseguir trazer coisas não existentes na nossa realidade para nossa imaginação, quanto de em uma simples folha ser </text:span><text:soft-page-break/><text:span text:style-name="T4">capaz de conter a história de vida de diversas pessoas que já se foram a muito tempo.</text:span></text:p>
      <text:p text:style-name="P13"/>
      <text:p text:style-name="P14">Além de que me desperta a curiosidade do resultado das respostas do quiz, para saber o <text:span text:style-name="T5">desempenho</text:span> da maioria das pessoas em relação a este tópico.</text:p>
      <text:p text:style-name="P14"/>
      <text:p text:style-name="P15">ESCOPO:</text:p>
      <text:p text:style-name="P15"/>
      <text:list text:style-name="L1">
        <text:list-item>
          <text:p text:style-name="P16">Aplicação Web</text:p>
          <text:p text:style-name="P16"/>
        </text:list-item>
        <text:list-item>
          <text:p text:style-name="P16">Captura de Dados do quiz</text:p>
          <text:p text:style-name="P16"/>
        </text:list-item>
        <text:list-item>
          <text:p text:style-name="P16">Tela Dashboard com resultados do quiz</text:p>
          <text:p text:style-name="P16"/>
        </text:list-item>
        <text:list-item>
          <text:p text:style-name="P16">Requisição dos dados a partir de BD MySQL com API</text:p>
          <text:p text:style-name="P16"/>
        </text:list-item>
        <text:list-item>
          <text:p text:style-name="P16">Disponibilização de material artístico na aplicação Web</text:p>
          <text:p text:style-name="P16"/>
        </text:list-item>
        <text:list-item>
          <text:p text:style-name="P16">Tela de Cadastro e Login com inserção de dados no BD com API</text:p>
        </text:list-item>
      </text:list>
      <text:p text:style-name="P17"/>
      <text:p text:style-name="P18">PREMISSAS:</text:p>
      <text:p text:style-name="P18"/>
      <text:p text:style-name="P18">-<text:span text:style-name="T3"> A aplicação rodará em máquina local e todas as interações serão feitas nesta mesma máquina</text:span></text:p>
      <text:p text:style-name="P19"/>
      <text:p text:style-name="P18">-<text:span text:style-name="T3"> A máquina Host terá poder de processamento suficiente para rodar a aplicação Web</text:span></text:p>
      <text:p text:style-name="P19"/>
      <text:p text:style-name="P20">REQUISITOS FUNCIONAIS:</text:p>
      <text:p text:style-name="P20"/>
      <text:p text:style-name="P21">RF01 – <text:span text:style-name="T6">O sistema deve permitir o cadastro e login de usuários com nome, email e senha;</text:span></text:p>
      <text:p text:style-name="P22"/>
      <text:p text:style-name="P21">RF02 – <text:span text:style-name="T6">O sistema deve permitir o logout e login dos usuários;</text:span></text:p>
      <text:p text:style-name="P22"/>
      <text:p text:style-name="P21">RF03 – <text:span text:style-name="T6">O sistema deve disponibilizar um quiz para os usuários responderem;</text:span></text:p>
      <text:p text:style-name="P22"/>
      <text:p text:style-name="P21">RF04 – <text:span text:style-name="T6">O sistema deve disponibilizar uma tela de Dashboard com indicadores sobre os resultados do quiz;</text:span></text:p>
      <text:p text:style-name="P22"/>
      <text:p text:style-name="P23"><text:soft-page-break/>REQUISITOS NÃO FUNCIONAIS:</text:p>
      <text:p text:style-name="P23"/>
      <text:p text:style-name="P21">RNF01 – <text:span text:style-name="T6">Os dados de login dos usuários devem ser armazenadas de forma segura no Banco de Dados;</text:span></text:p>
      <text:p text:style-name="P22"/>
      <text:p text:style-name="P21">RNF02 – <text:span text:style-name="T6">A aplicação Web deve ter uma interface visualmente agradável com funcionalidades intuitivas</text:span><text:span text:style-name="T7">;</text:span></text:p>
      <text:p text:style-name="P24"/>
      <text:p text:style-name="P25">RNF03 – <text:span text:style-name="T6">O site deve funcionar nos principais navegadores Web (Edge, Chrome, Firefox);</text:span></text:p>
      <text:p text:style-name="P26"/>
      <text:p text:style-name="P25">RNF04 – <text:span text:style-name="T6">O site deve rodar na máquina local;</text:span></text:p>
      <text:p text:style-name="P26"/>
      <text:p text:style-name="P27">RESTRIÇÕES:</text:p>
      <text:p text:style-name="P27"/>
      <text:list text:style-name="L2">
        <text:list-item>
          <text:p text:style-name="P28">O proje<text:span text:style-name="T8">to deve ser entregue e finalizado até o prazo estabelecido pelo calendário acadêmico;</text:span></text:p>
        </text:list-item>
        <text:list-item>
          <text:p text:style-name="P29">O projeto rodará somente na maquina local;</text:p>
        </text:list-item>
      </text:list>
      <text:p text:style-name="P30"/>
      <text:p text:style-name="P31"/>
      <text:p text:style-name="P32">METODOLOGIA UTILIZADA E BACKLOG:</text:p>
      <text:p text:style-name="P32"/>
      <text:list text:style-name="L3">
        <text:list-item>
          <text:p text:style-name="P33">Utiliza SCRUM</text:p>
        </text:list-item>
        <text:list-item>
          <text:p text:style-name="P33">BACKLOG principalmenteferramenta TRELLO</text:p>
        </text:list-item>
        <text:list-item>
          <text:p text:style-name="P33"/>
        </text:list-item>
      </text:list>
      <text:p text:style-name="P22"><draw:frame draw:style-name="fr1" draw:name="Image1" text:anchor-type="char" svg:x="-0.0626in" svg:y="0.2252in" svg:width="3.9075in" svg:height="3.1854in" draw:z-index="0"><draw:image xlink:href="Pictures/10000001000004DD000003F70DF9E372.png" xlink:type="simple" xlink:show="embed" xlink:actuate="onLoad" draw:mime-type="image/png"/></draw:frame></text:p>
      <text:p text:style-name="P19"/>
      <text:p text:style-name="P18"/>
      <text:p text:style-name="P14"/>
      <text:p text:style-name="P34"/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><text:soft-page-break/>DIAGRAMA DE NEGÓCIO:</text:p>
      <text:p text:style-name="P37"><draw:frame draw:style-name="fr2" draw:name="Image2" text:anchor-type="char" svg:width="6.9252in" svg:height="3.8953in" draw:z-index="1"><draw:image xlink:href="Pictures/100000000000078000000438A2C89372.png" xlink:type="simple" xlink:show="embed" xlink:actuate="onLoad" draw:mime-type="image/png"/></draw:frame></text:p>
      <text:p text:style-name="P38">DIAGRAMA DE SOLUÇÃO TÉCNICA:<draw:frame draw:style-name="fr1" draw:name="Image3" text:anchor-type="char" svg:x="0.4161in" svg:y="1.5063in" svg:width="5.6346in" svg:height="4.9634in" draw:z-index="2"><draw:image xlink:href="Pictures/10000001000003CE0000035A493ABA15.png" xlink:type="simple" xlink:show="embed" xlink:actuate="onLoad" draw:mime-type="image/png"/></draw:frame></text:p>
      <text:p text:style-name="P38"/>
      <text:p text:style-name="P39"/>
      <text:p text:style-name="P39"/>
      <text:p text:style-name="P39"><text:soft-page-break/>BIBLIOGRAFIA E DIREITOS AUTORAIS:</text:p>
      <text:p text:style-name="P40"/>
      <text:list text:style-name="L4">
        <text:list-item>
          <text:p text:style-name="P41">Google</text:p>
        </text:list-item>
        <text:list-item>
          <text:p text:style-name="P42">Wikipedia</text:p>
        </text:list-item>
        <text:list-item>
          <text:p text:style-name="P41">SakugaBooru</text:p>
        </text:list-item>
        <text:list-item>
          <text:p text:style-name="P41">MyAnimeList</text:p>
        </text:list-item>
        <text:list-item>
          <text:p text:style-name="P41"><text:span text:style-name="T9">Direitos autorais tutorial princípios da animação = </text:span>AlanBeckerTutorials</text:p>
        </text:list-item>
        <text:list-item>
          <text:p text:style-name="P41"><text:span text:style-name="T10">Criador de certas obras utilizadas = </text:span>Leonardo Davinci</text:p>
        </text:list-item>
        <text:list-item>
          <text:p text:style-name="P41">Direitos autorais ONE PUNCH MAN = ONE, Yusuke Murata.</text:p>
        </text:list-item>
        <text:list-item>
          <text:p text:style-name="P41">Direitos autorais Attack On Titan Genga = WIT STUDIO, Hajime Isayama.</text:p>
        </text:list-item>
        <text:list-item>
          <text:p text:style-name="P43">Direitos autorais BIRDY THE MIGHTY = Masami Yuki, Shogakukan.</text:p>
        </text:list-item>
        <text:list-item>
          <text:p text:style-name="P44">Direitos autorais MACROSS 7 = Big West, STUDIO NUE.</text:p>
        </text:list-item>
        <text:list-item>
          <text:p text:style-name="P45">Direitos autorais NARUTO = Masashi Kishimoto, Shueisha, STUDIO PIERROT, TV TOKYO, <text:s/>VIZ MEDIA.</text:p>
        </text:list-item>
        <text:list-item>
          <text:p text:style-name="P46">Direitos autorais Brave Exkaiser = STUDIO SUNRISE, Takara.</text:p>
        </text:list-item>
        <text:list-item>
          <text:p text:style-name="P47">Direitos autorais Yofukashi no Uta = Kotoyama, Shogakukan, Panini, Liden Films.</text:p>
        </text:list-item>
        <text:list-item>
          <text:p text:style-name="P48">Direitos autorais GAMEOVERSE = Ross O’Donovan, GLITCH PRODUCTIONS.</text:p>
        </text:list-item>
        <text:list-item>
          <text:p text:style-name="P48">Direitos autorais MOB PSYCHO 100 = ONE, Sh<text:span text:style-name="T11">ogakukan</text:span>, STUDIO BONES.</text:p>
        </text:list-item>
        <text:list-item>
          <text:p text:style-name="P49">Direitos autorais MY HERO ACADEMIA = <text:s/>Kohei Horikoshi, Shueisha, STUDIO BONES.</text:p>
        </text:list-item>
        <text:list-item>
          <text:p text:style-name="P50">Direitos autorais INVICIBLE = Robert Kirkman, Skybound Entertainment.</text:p>
        </text:list-item>
        <text:list-item>
          <text:p text:style-name="P50">Direitos autorais DRAGON BALL = Shueisha, Toei Animation, Bandai, Akira Toryama.</text:p>
        </text:list-item>
      </text:list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5:11.239153158</meta:creation-date>
    <dc:date>2026-06-01T10:05:46.657351831</dc:date>
    <meta:editing-duration>PT9H43M10S</meta:editing-duration>
    <meta:editing-cycles>32</meta:editing-cycles>
    <meta:generator>LibreOffice/25.8.7.3$Linux_X86_64 LibreOffice_project/580$Build-3</meta:generator>
    <meta:document-statistic meta:table-count="0" meta:image-count="3" meta:object-count="0" meta:page-count="6" meta:paragraph-count="63" meta:word-count="764" meta:character-count="4727" meta:non-whitespace-character-count="4044"/>
  </office:meta>
</office:document-meta>
</file>